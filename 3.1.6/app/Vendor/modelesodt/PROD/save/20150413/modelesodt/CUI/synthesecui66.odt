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RESENTATION" style:family="table">
      <style:table-properties style:width="16.96cm" table:align="left"/>
    </style:style>
    <style:style style:name="PRESENTATION.A" style:family="table-column">
      <style:table-column-properties style:column-width="8.361cm"/>
    </style:style>
    <style:style style:name="PRESENTATION.B" style:family="table-column">
      <style:table-column-properties style:column-width="8.599cm"/>
    </style:style>
    <style:style style:name="PRESENT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TATION.B1" style:family="table-cell">
      <style:table-cell-properties fo:padding="0.097cm" fo:border="0.05pt solid #000000"/>
    </style:style>
    <style:style style:name="PRESENTATION.A2" style:family="table-cell">
      <style:table-cell-properties fo:padding="0.097cm" fo:border-left="0.05pt solid #000000" fo:border-right="none" fo:border-top="none" fo:border-bottom="0.05pt solid #000000"/>
    </style:style>
    <style:style style:name="PRESENTATIO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317b7e" officeooo:paragraph-rsid="00317b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a8262"/>
    </style:style>
    <style:style style:name="P4" style:family="paragraph" style:parent-style-name="Standard">
      <style:text-properties style:font-name="Arial" style:text-underline-style="none" fo:font-weight="normal" officeooo:rsid="002e7f48" officeooo:paragraph-rsid="000be01f" style:font-weight-asian="normal" style:font-weight-complex="norm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0719c7" officeooo:paragraph-rsid="000719c7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style:font-name="Arial" officeooo:paragraph-rsid="003410dd"/>
    </style:style>
    <style:style style:name="P8" style:family="paragraph" style:parent-style-name="Table_20_Contents">
      <style:text-properties style:font-name="Arial" officeooo:paragraph-rsid="000d52d0"/>
    </style:style>
    <style:style style:name="P9" style:family="paragraph" style:parent-style-name="Table_20_Contents">
      <style:text-properties style:font-name="Arial" officeooo:paragraph-rsid="000719c7"/>
    </style:style>
    <style:style style:name="P10" style:family="paragraph" style:parent-style-name="Table_20_Contents">
      <style:text-properties style:font-name="Arial" fo:font-weight="bold" officeooo:rsid="002cf383" officeooo:paragraph-rsid="002cf383" style:font-weight-asian="bold" style:font-weight-complex="bold"/>
    </style:style>
    <style:style style:name="P11" style:family="paragraph" style:parent-style-name="Table_20_Contents">
      <style:text-properties style:font-name="Arial" fo:font-weight="bold" officeooo:rsid="00104a7a" officeooo:paragraph-rsid="00104a7a" style:font-weight-asian="bold" style:font-weight-complex="bold"/>
    </style:style>
    <style:style style:name="P12" style:family="paragraph" style:parent-style-name="Table_20_Contents">
      <style:text-properties style:font-name="Arial" fo:font-weight="bold" officeooo:paragraph-rsid="0035ec47" style:font-weight-asian="bold" style:font-weight-complex="bold"/>
    </style:style>
    <style:style style:name="P13" style:family="paragraph" style:parent-style-name="Table_20_Contents">
      <style:text-properties style:font-name="Arial" officeooo:rsid="000719c7" officeooo:paragraph-rsid="000719c7"/>
    </style:style>
    <style:style style:name="P14" style:family="paragraph" style:parent-style-name="Table_20_Contents">
      <style:text-properties style:font-name="Arial" officeooo:rsid="000719c7" officeooo:paragraph-rsid="002a800c"/>
    </style:style>
    <style:style style:name="P15" style:family="paragraph" style:parent-style-name="Table_20_Contents">
      <style:text-properties style:font-name="Arial" style:text-underline-style="solid" style:text-underline-width="auto" style:text-underline-color="font-color" fo:font-weight="bold" officeooo:rsid="000719c7" officeooo:paragraph-rsid="000719c7" style:font-weight-asian="bold" style:font-weight-complex="bold"/>
    </style:style>
    <style:style style:name="P16" style:family="paragraph" style:parent-style-name="Table_20_Contents">
      <style:text-properties style:font-name="Arial" officeooo:paragraph-rsid="0035b7dc"/>
    </style:style>
    <style:style style:name="P17" style:family="paragraph" style:parent-style-name="Table_20_Contents">
      <style:text-properties style:font-name="Arial" officeooo:paragraph-rsid="00273768"/>
    </style:style>
    <style:style style:name="P18" style:family="paragraph" style:parent-style-name="Table_20_Contents">
      <style:text-properties style:font-name="Arial" officeooo:rsid="00172d5d" officeooo:paragraph-rsid="000719c7"/>
    </style:style>
    <style:style style:name="P19" style:family="paragraph" style:parent-style-name="Table_20_Contents">
      <style:text-properties style:font-name="Arial" officeooo:rsid="00222d04" officeooo:paragraph-rsid="000719c7"/>
    </style:style>
    <style:style style:name="P20" style:family="paragraph" style:parent-style-name="Table_20_Contents">
      <style:text-properties style:font-name="Arial" officeooo:paragraph-rsid="00258662"/>
    </style:style>
    <style:style style:name="P21" style:family="paragraph" style:parent-style-name="Table_20_Contents">
      <style:text-properties style:font-name="Arial" officeooo:rsid="00258662" officeooo:paragraph-rsid="00313936"/>
    </style:style>
    <style:style style:name="P22" style:family="paragraph" style:parent-style-name="Table_20_Contents">
      <style:text-properties style:font-name="Arial" officeooo:rsid="00258662" officeooo:paragraph-rsid="00258662"/>
    </style:style>
    <style:style style:name="P23" style:family="paragraph" style:parent-style-name="Table_20_Contents">
      <style:text-properties style:font-name="Arial" officeooo:rsid="002e7f48" officeooo:paragraph-rsid="002e7f48"/>
    </style:style>
    <style:style style:name="P24" style:family="paragraph" style:parent-style-name="Table_20_Contents">
      <style:text-properties style:font-name="Arial" officeooo:rsid="0029fdd0" officeooo:paragraph-rsid="000719c7"/>
    </style:style>
    <style:style style:name="P25" style:family="paragraph" style:parent-style-name="Table_20_Contents">
      <style:text-properties style:font-name="Arial" officeooo:rsid="002025ac" officeooo:paragraph-rsid="000719c7"/>
    </style:style>
    <style:style style:name="P26" style:family="paragraph" style:parent-style-name="Table_20_Contents">
      <style:text-properties style:font-name="Arial" officeooo:rsid="00273768" officeooo:paragraph-rsid="00273768"/>
    </style:style>
    <style:style style:name="P27" style:family="paragraph" style:parent-style-name="Table_20_Contents">
      <style:text-properties style:font-name="Arial" officeooo:paragraph-rsid="0028c1a5"/>
    </style:style>
    <style:style style:name="P28" style:family="paragraph" style:parent-style-name="Table_20_Contents">
      <style:text-properties style:font-name="Arial" officeooo:paragraph-rsid="0035ec47"/>
    </style:style>
    <style:style style:name="P29" style:family="paragraph" style:parent-style-name="Table_20_Contents">
      <style:text-properties style:font-name="Arial" officeooo:paragraph-rsid="00362d36"/>
    </style:style>
    <style:style style:name="P30" style:family="paragraph" style:parent-style-name="Standard">
      <style:paragraph-properties fo:text-align="center" style:justify-single-word="false"/>
      <style:text-properties style:font-name="Arial" officeooo:rsid="000719c7" officeooo:paragraph-rsid="0038cd83"/>
    </style:style>
    <style:style style:name="P31" style:family="paragraph" style:parent-style-name="Table_20_Contents">
      <style:text-properties style:font-name="Arial" officeooo:rsid="003410dd" officeooo:paragraph-rsid="003410dd" style:font-name-asian="Arial Unicode MS" style:font-name-complex="Mangal"/>
    </style:style>
    <style:style style:name="P32" style:family="paragraph" style:parent-style-name="Table_20_Contents">
      <style:text-properties style:font-name="Arial" officeooo:paragraph-rsid="0039abbf"/>
    </style:style>
    <style:style style:name="T1" style:family="text">
      <style:text-properties officeooo:rsid="000719c7"/>
    </style:style>
    <style:style style:name="T2" style:family="text">
      <style:text-properties style:text-underline-style="solid" style:text-underline-width="auto" style:text-underline-color="font-color" fo:font-weight="bold" officeooo:rsid="000719c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5866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1393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0822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19c7" style:font-weight-asian="bold" style:font-weight-complex="bold"/>
    </style:style>
    <style:style style:name="T9" style:family="text">
      <style:text-properties fo:font-weight="bold" officeooo:rsid="000822a9" style:font-weight-asian="bold" style:font-weight-complex="bold"/>
    </style:style>
    <style:style style:name="T10" style:family="text">
      <style:text-properties fo:font-weight="bold" officeooo:rsid="000d52d0" style:font-weight-asian="bold" style:font-weight-complex="bold"/>
    </style:style>
    <style:style style:name="T11" style:family="text">
      <style:text-properties fo:font-weight="bold" officeooo:rsid="0028c1a5" style:font-weight-asian="bold" style:font-weight-complex="bold"/>
    </style:style>
    <style:style style:name="T12" style:family="text">
      <style:text-properties fo:font-weight="bold" officeooo:rsid="002f6d08" style:font-weight-asian="bold" style:font-weight-complex="bold"/>
    </style:style>
    <style:style style:name="T13" style:family="text">
      <style:text-properties fo:font-weight="bold" officeooo:rsid="003410dd" style:font-weight-asian="bold" style:font-weight-complex="bold"/>
    </style:style>
    <style:style style:name="T14" style:family="text">
      <style:text-properties officeooo:rsid="000d52d0"/>
    </style:style>
    <style:style style:name="T15" style:family="text">
      <style:text-properties officeooo:rsid="00258662"/>
    </style:style>
    <style:style style:name="T16" style:family="text">
      <style:text-properties officeooo:rsid="00273768"/>
    </style:style>
    <style:style style:name="T17" style:family="text">
      <style:text-properties fo:font-style="normal" style:text-underline-style="none" fo:font-weight="bold" officeooo:rsid="00273768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35b7dc" style:font-style-asian="normal" style:font-weight-asian="bold" style:font-style-complex="normal" style:font-weight-complex="bold"/>
    </style:style>
    <style:style style:name="T19" style:family="text">
      <style:text-properties officeooo:rsid="0028c1a5"/>
    </style:style>
    <style:style style:name="T20" style:family="text">
      <style:text-properties officeooo:rsid="002f6d08"/>
    </style:style>
    <style:style style:name="T21" style:family="text">
      <style:text-properties officeooo:rsid="003410dd"/>
    </style:style>
    <style:style style:name="T22" style:family="text">
      <style:text-properties officeooo:rsid="0035b7dc"/>
    </style:style>
    <style:style style:name="T23" style:family="text">
      <style:text-properties officeooo:rsid="0035ec47"/>
    </style:style>
    <style:style style:name="T24" style:family="text">
      <style:text-properties fo:font-size="12pt" fo:font-weight="normal" officeooo:rsid="0015f225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0130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2989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410dd" style:font-size-asian="12pt" style:font-weight-asian="normal" style:font-size-complex="12pt" style:font-weight-complex="normal"/>
    </style:style>
    <style:style style:name="T28" style:family="text">
      <style:text-properties fo:font-size="12pt" fo:language="fr" fo:country="FR" fo:font-style="normal" fo:font-weight="normal" officeooo:rsid="0015f22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9" style:family="text">
      <style:text-properties fo:font-size="12pt" fo:language="fr" fo:country="FR" fo:font-weight="normal" officeooo:rsid="0015f225" style:font-name-asian="Arial" style:font-size-asian="12pt" style:font-weight-asian="normal" style:font-name-complex="Arial" style:font-size-complex="12pt" style:font-weight-complex="normal"/>
    </style:style>
    <style:style style:name="T30" style:family="text">
      <style:text-properties fo:font-size="12pt" fo:font-style="normal" fo:font-weight="normal" officeooo:rsid="001e4e4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weight="normal" officeooo:rsid="0035b7dc" style:font-weight-asian="normal" style:font-weight-complex="normal"/>
    </style:style>
    <style:style style:name="T32" style:family="text">
      <style:text-properties fo:font-weight="normal" officeooo:rsid="003410dd" style:font-weight-asian="normal" style:font-weight-complex="normal"/>
    </style:style>
    <style:style style:name="T33" style:family="text">
      <style:text-properties officeooo:rsid="00362d36"/>
    </style:style>
    <style:style style:name="T34" style:family="text">
      <style:text-properties officeooo:rsid="0038cd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matricule" text:name="dossier_matricule"/>
        <text:user-field-decl office:value-type="string" office:string-value="codepos" text:name="adresse_codepos"/>
        <text:user-field-decl office:value-type="string" office:string-value="locaadr" text:name="adresse_locaadr"/>
        <text:user-field-decl office:value-type="string" office:string-value="cui_datedemande" text:name="cui_datedemande"/>
        <text:user-field-decl office:value-type="string" office:string-value="cui_datecontrat" text:name="cui_datecontrat"/>
        <text:user-field-decl office:value-type="string" office:string-value="cui_created" text:name="cui_created"/>
        <text:user-field-decl office:value-type="string" office:string-value="cui_typecui" text:name="cui_typecui"/>
        <text:user-field-decl office:value-type="string" office:string-value="personne_dtnai" text:name="personne_dtnai"/>
        <text:user-field-decl office:value-type="string" office:string-value="adresse_nomcom" text:name="adresse_nomcom"/>
        <text:user-field-decl office:value-type="string" office:string-value="adresse_libtypevoie" text:name="adresse_libtypevoie"/>
      </text:user-field-decls>
      <text:p text:style-name="P1"/>
      <text:p text:style-name="P30"><text:span text:style-name="T5">TYPE DEMANDE</text:span> : </text:p>
      <text:p text:style-name="P30"><text:span text:style-name="T34">Demande faite le <text:s/></text:span><text:user-field-get text:name="cui_datecontrat">cui_datecontrat</text:user-field-get></text:p>
      <text:p text:style-name="P30"><text:span text:style-name="T34">Demande enregistrée le </text:span><text:span text:style-name="T34"><text:user-field-get text:name="cui_created">cui_created</text:user-field-get></text:span></text:p>
      <text:p text:style-name="P30"><text:span text:style-name="T34">Type de contrat : </text:span><text:span text:style-name="T34"><text:user-field-get text:name="cui_typecui">cui_typecui</text:user-field-get></text:span></text:p>
      <text:p text:style-name="P30"><text:span text:style-name="T23"/></text:p>
      <text:p text:style-name="P2"/>
      <text:p text:style-name="P3"/>
      <table:table table:name="PRESENTATION" table:style-name="PRESENTATION">
        <table:table-column table:style-name="PRESENTATION.A"/>
        <table:table-column table:style-name="PRESENTATION.B"/>
        <table:table-row>
          <table:table-cell table:style-name="PRESENTATION.A1" office:value-type="string">
            <text:p text:style-name="P6">BENEFICIAIRE</text:p>
          </table:table-cell>
          <table:table-cell table:style-name="PRESENTATION.B1" office:value-type="string">
            <text:p text:style-name="P6">EMPLOYEUR</text:p>
          </table:table-cell>
        </table:table-row>
        <table:table-row>
          <table:table-cell table:style-name="PRESENTATION.A2" office:value-type="string">
            <text:p text:style-name="P7"><text:span text:style-name="T12">Nom</text:span><text:span text:style-name="T20"> : <text:s/></text:span><text:span text:style-name="T24"><text:tab/></text:span><text:span text:style-name="T24"><text:user-field-get text:name="personne_nom">nom</text:user-field-get></text:span></text:p>
            <text:p text:style-name="P7"><text:span text:style-name="T8">Prénom</text:span><text:span text:style-name="T1"> : </text:span><text:span text:style-name="T24"><text:user-field-get text:name="personne_prenom">prenom</text:user-field-get></text:span></text:p>
            <text:p text:style-name="P8"><text:span text:style-name="T10">Age</text:span><text:span text:style-name="T14"> : </text:span><text:span text:style-name="T21"><text:user-field-get text:name="personne_dtnai">personne_dtnai</text:user-field-get></text:span></text:p>
            <text:p text:style-name="P7"><text:span text:style-name="T8">Caf</text:span><text:span text:style-name="T1"> : </text:span><text:span text:style-name="T28"><text:user-field-get text:name="dossier_matricule">matricule</text:user-field-get></text:span></text:p>
            <text:p text:style-name="P7"><text:span text:style-name="T8">Adresse</text:span><text:span text:style-name="T1"> : </text:span><text:span text:style-name="T24"><text:user-field-get text:name="adresse_numvoie">numvoie</text:user-field-get></text:span><text:span text:style-name="T24"> </text:span><text:span text:style-name="T24"><text:s/></text:span><text:span text:style-name="T24"><text:user-field-get text:name="adresse_libtypevoie">adresse_libtypevoie</text:user-field-get></text:span></text:p>
            <text:p text:style-name="P7"><text:span text:style-name="T24"><text:user-field-get text:name="adresse_nomvoie">nomvoie</text:user-field-get></text:span><text:span text:style-name="T24"><text:user-field-get text:name="adresse_complideadr">complideadr</text:user-field-get></text:span><text:span text:style-name="T24"><text:user-field-get text:name="adresse_compladr">compladr</text:user-field-get></text:span></text:p>
            <text:p text:style-name="P32"><text:span text:style-name="T8">Ville</text:span><text:span text:style-name="T1"> :</text:span><text:span text:style-name="T29"><text:user-field-get text:name="adresse_nomcom">adresse_nomcom</text:user-field-get></text:span><text:span text:style-name="T29"> </text:span><text:span text:style-name="T29"><text:user-field-get text:name="adresse_codepos">codepos</text:user-field-get></text:span><text:span text:style-name="T29"> </text:span></text:p>
            <text:p text:style-name="P9"><text:span text:style-name="T8">Canton</text:span><text:span text:style-name="T1"> : </text:span><text:span text:style-name="T23">champ</text:span></text:p>
            <text:p text:style-name="P9"><text:span text:style-name="T8">Elu</text:span><text:span text:style-name="T1"> : </text:span></text:p>
            <text:p text:style-name="P7"><text:span text:style-name="T8">Tel</text:span><text:span text:style-name="T1"> : </text:span><text:span text:style-name="T25">Champ du bénéf</text:span><text:span text:style-name="T26">iciaire</text:span><text:span text:style-name="T25"> (de l'identité)</text:span></text:p>
            <text:p text:style-name="P7"><text:span text:style-name="T25"><text:s text:c="8"/>Champ du bénéf</text:span><text:span text:style-name="T27"> ( portable)</text:span></text:p>
            <text:p text:style-name="P9"><text:span text:style-name="T8">Situation Familiale</text:span><text:span text:style-name="T1"> : </text:span><text:span text:style-name="T21">Champ bénéficiaire</text:span></text:p>
            <text:p text:style-name="P12"><text:span text:style-name="T21">Nombre d'enfant </text:span><text:span text:style-name="T1">: </text:span><text:span text:style-name="T32">Champ </text:span></text:p>
            <text:p text:style-name="P12"><text:span text:style-name="T21">Age des enfants :</text:span><text:span text:style-name="T1"> </text:span><text:span text:style-name="T32">Champ </text:span></text:p>
            <text:p text:style-name="P28"><text:span text:style-name="T13">Ancienneté dans le dispositif</text:span><text:span text:style-name="T8"> </text:span><text:span text:style-name="T1">: </text:span><text:span text:style-name="T21">Champ </text:span></text:p>
            <text:p text:style-name="P31"/>
            <text:p text:style-name="P9"><text:span text:style-name="T8">Diplômes obtenus</text:span><text:span text:style-name="T1"> : </text:span><text:span text:style-name="T21">champ DSP</text:span></text:p>
            <text:p text:style-name="P9"><text:span text:style-name="T8">Formations </text:span><text:span text:style-name="T1">: </text:span><text:span text:style-name="T22">valeur champ interne/externe</text:span></text:p>
            <text:p text:style-name="P13"/>
            <text:p text:style-name="P9"><text:span text:style-name="T8">Orientation et Référent</text:span><text:span text:style-name="T1"> : </text:span><text:span text:style-name="T22">champ orientation</text:span></text:p>
            <text:p text:style-name="P13"/>
            <text:p text:style-name="P15">SITUATION CHEZ EMPLOYEUR</text:p>
            <text:p text:style-name="P13"/>
            <text:p text:style-name="P16"><text:span text:style-name="T8">Intitulé Poste</text:span><text:span text:style-name="T1"> : </text:span><text:span text:style-name="T30">Champ Métier d'emploi proposé </text:span></text:p>
            <text:p text:style-name="P16"><text:span text:style-name="T8">Durée hebdomadaire </text:span><text:span text:style-name="T1">: </text:span><text:span text:style-name="T30">Champ durée hebdomadaire</text:span></text:p>
            <text:p text:style-name="P17"><text:span text:style-name="T18">Nombre de CUI</text:span><text:span text:style-name="T16"> : </text:span><text:span text:style-name="T22">champ visualisation CUI</text:span></text:p>
            <text:p text:style-name="P10">Absences durant contrat: <text:span text:style-name="T31">champ accompagnement CUI</text:span></text:p>
            <text:p text:style-name="P9"><text:span text:style-name="T8">Durée demandée </text:span><text:span text:style-name="T1">: </text:span><text:span text:style-name="T22">champ du CUI</text:span></text:p>
            <text:p text:style-name="P9"><text:span text:style-name="T8">Responsable</text:span><text:span text:style-name="T1"> : </text:span><text:span text:style-name="T22">champ du CUI</text:span></text:p>
            <text:p text:style-name="P9"><text:span text:style-name="T8">Tuteur </text:span><text:span text:style-name="T1">: </text:span><text:span text:style-name="T22">champ du CUI</text:span></text:p>
            <text:p text:style-name="P18"/>
            <text:p text:style-name="P9"><text:span text:style-name="T8">Organisme partenaire </text:span><text:span text:style-name="T9">référent</text:span><text:span text:style-name="T6"> </text:span><text:span text:style-name="T1">:</text:span><text:span text:style-name="T6"> </text:span></text:p>
            <text:p text:style-name="P19"/>
            <text:p text:style-name="P20"><text:span text:style-name="T3">Formations </text:span><text:span text:style-name="T4">Prévues lors contrat(s) précédent(s) </text:span><text:span text:style-name="T15">:</text:span><text:span text:style-name="T23">champ</text:span></text:p>
            <text:p text:style-name="P21"/>
            <text:p text:style-name="P22"/>
            <text:p text:style-name="P20"><text:span text:style-name="T2">Formations prévues</text:span><text:span text:style-name="T8"> </text:span><text:span text:style-name="T1">: </text:span><text:span text:style-name="T33">champ</text:span></text:p>
            <text:p text:style-name="P23"/>
            <text:p text:style-name="P23"/>
            <text:p text:style-name="P9"><text:soft-page-break/><text:span text:style-name="T8">Pérennisation</text:span><text:span text:style-name="T1"> :</text:span><text:span text:style-name="T33">champ</text:span></text:p>
            <text:p text:style-name="P13"/>
          </table:table-cell>
          <table:table-cell table:style-name="PRESENTATION.B2" office:value-type="string">
            <text:p text:style-name="P5"/>
            <text:p text:style-name="P9"><text:span text:style-name="T8">Dénomination</text:span><text:span text:style-name="T1"> : </text:span><text:span text:style-name="T33">champ</text:span></text:p>
            <text:p text:style-name="P13"/>
            <text:p text:style-name="P29"><text:span text:style-name="T8">Maire (si Mairie)</text:span><text:span text:style-name="T1"> : </text:span><text:span text:style-name="T21">Champ </text:span></text:p>
            <text:p text:style-name="P13"/>
            <text:p text:style-name="P29"><text:span text:style-name="T8">Adresse </text:span><text:span text:style-name="T1">: </text:span><text:span text:style-name="T21">Champ </text:span></text:p>
            <text:p text:style-name="P24"/>
            <text:p text:style-name="P9"><text:span text:style-name="T8">Ville</text:span><text:span text:style-name="T1"> :</text:span></text:p>
            <text:p text:style-name="P13"/>
            <text:p text:style-name="P9"><text:span text:style-name="T8">Tel </text:span><text:span text:style-name="T1">: </text:span></text:p>
            <text:p text:style-name="P25"/>
            <text:p text:style-name="P29"><text:span text:style-name="T8">Mail</text:span><text:span text:style-name="T1"> : </text:span><text:span text:style-name="T21">Champ </text:span></text:p>
            <text:p text:style-name="P13"/>
            <text:p text:style-name="P29"><text:span text:style-name="T8">Statut</text:span><text:span text:style-name="T1"> : </text:span><text:span text:style-name="T21">Champ </text:span></text:p>
            <text:p text:style-name="P13"/>
            <text:p text:style-name="P29"><text:span text:style-name="T8">Secteur d'activité</text:span><text:span text:style-name="T1"> : </text:span><text:span text:style-name="T21">Champ </text:span></text:p>
            <text:p text:style-name="P13"/>
            <text:p text:style-name="P29"><text:span text:style-name="T17">Objet</text:span><text:span text:style-name="T16"> : </text:span><text:span text:style-name="T21">Champ </text:span></text:p>
            <text:p text:style-name="P26"/>
            <text:p text:style-name="P29"><text:span text:style-name="T8">Nombre de Salariés</text:span><text:span text:style-name="T1"> : </text:span><text:span text:style-name="T21">Champ </text:span></text:p>
            <text:p text:style-name="P13"/>
            <text:p text:style-name="P29"><text:span text:style-name="T11">Nombre de Lits ( si etblt)</text:span><text:span text:style-name="T19"> : </text:span><text:span text:style-name="T21">Champ </text:span></text:p>
            <text:p text:style-name="P13"/>
            <text:p text:style-name="P9"><text:span text:style-name="T8">Nombre contrats aidés en cours</text:span><text:span text:style-name="T1"> : </text:span><text:span text:style-name="T33">à récup</text:span></text:p>
            <text:p text:style-name="P13"/>
            <text:p text:style-name="P27"><text:span text:style-name="T11">Dont Conseil Général</text:span><text:span text:style-name="T19"> : </text:span><text:span text:style-name="T33">à récup</text:span></text:p>
            <text:p text:style-name="P13"/>
            <text:p text:style-name="P13"><text:span text:style-name="T7">Fonctions</text:span> : <text:span text:style-name="T33">champ</text:span></text:p>
            <text:p text:style-name="P14"/>
            <text:p text:style-name="P9"><text:span text:style-name="T8">Subventionnés Conseil Général </text:span><text:span text:style-name="T1">: </text:span><text:span text:style-name="T33">champ</text:span></text:p>
            <text:p text:style-name="P13"/>
            <text:p text:style-name="P9"><text:span text:style-name="T8">Conseiller Général</text:span><text:span text:style-name="T1"> : </text:span><text:span text:style-name="T33">champ</text:span></text:p>
            <text:p text:style-name="P13"/>
            <text:p text:style-name="P1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antha ROCA</meta:initial-creator>
    <meta:creation-date>2013-02-15T16:45:09.43</meta:creation-date>
    <dc:date>2014-07-10T16:19:01</dc:date>
    <dc:creator>Arnaud Auzolat</dc:creator>
    <meta:editing-duration>PT59M3S</meta:editing-duration>
    <meta:editing-cycles>35</meta:editing-cycles>
    <meta:generator>LibreOffice/4.0.5.2$Linux_X86_64 LibreOffice_project/5464147a081647a250913f19c0715bca595af2f</meta:generator>
    <meta:printed-by>Arnaud Auzolat</meta:printed-by>
    <meta:print-date>2014-07-10T14:05:40</meta:print-date>
    <meta:document-statistic meta:table-count="1" meta:image-count="0" meta:object-count="0" meta:page-count="2" meta:paragraph-count="52" meta:word-count="219" meta:character-count="1390" meta:non-whitespace-character-count="1194"/>
  </office:meta>
</office:document-meta>
</file>