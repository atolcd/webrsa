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ecisionscovs58" style:family="table">
      <style:table-properties style:width="25.689cm" table:align="left" style:writing-mode="lr-tb"/>
    </style:style>
    <style:style style:name="Decisionscovs58.A" style:family="table-column">
      <style:table-column-properties style:column-width="2.574cm"/>
    </style:style>
    <style:style style:name="Decisionscovs58.B" style:family="table-column">
      <style:table-column-properties style:column-width="2.406cm"/>
    </style:style>
    <style:style style:name="Decisionscovs58.C" style:family="table-column">
      <style:table-column-properties style:column-width="2.3cm"/>
    </style:style>
    <style:style style:name="Decisionscovs58.D" style:family="table-column">
      <style:table-column-properties style:column-width="2.799cm"/>
    </style:style>
    <style:style style:name="Decisionscovs58.E" style:family="table-column">
      <style:table-column-properties style:column-width="2.189cm"/>
    </style:style>
    <style:style style:name="Decisionscovs58.G" style:family="table-column">
      <style:table-column-properties style:column-width="3.014cm"/>
    </style:style>
    <style:style style:name="Decisionscovs58.H" style:family="table-column">
      <style:table-column-properties style:column-width="2.718cm"/>
    </style:style>
    <style:style style:name="Decisionscovs58.I" style:family="table-column">
      <style:table-column-properties style:column-width="2.646cm"/>
    </style:style>
    <style:style style:name="Decisionscovs58.J" style:family="table-column">
      <style:table-column-properties style:column-width="2.743cm"/>
    </style:style>
    <style:style style:name="Decisionscovs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cisionscovs58.J1" style:family="table-cell">
      <style:table-cell-properties fo:padding="0.097cm" fo:border="0.002cm solid #000000"/>
    </style:style>
    <style:style style:name="Decisionscovs58.A2" style:family="table-cell">
      <style:table-cell-properties fo:padding="0.097cm" fo:border-left="0.002cm solid #000000" fo:border-right="none" fo:border-top="none" fo:border-bottom="0.002cm solid #000000"/>
    </style:style>
    <style:style style:name="Decisionscovs58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Heading_20_1" style:master-page-name="Standard">
      <style:paragraph-properties fo:text-align="center" style:justify-single-word="false" style:page-number="auto"/>
    </style:style>
    <style:style style:name="P5" style:family="paragraph" style:parent-style-name="Table_20_Contents">
      <style:paragraph-properties fo:text-align="justify" style:justify-single-word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cov58_datecommission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omcom"/>
        <text:user-field-decl office:value-type="float" office:value="0" text:name="dossiers_dtdemrsa"/>
        <text:user-field-decl office:value-type="string" office:string-value="" text:name="themecov58_name"/>
        <text:user-field-decl office:value-type="string" office:string-value="" text:name="propoorientationcov58_decisioncov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ropocontratinsertioncov58_decisioncov"/>
        <text:user-field-decl office:value-type="string" office:string-value="" text:name="propocontratinsertioncov58_dd_ci"/>
        <text:user-field-decl office:value-type="string" office:string-value="" text:name="propocontratinsertioncov58_df_ci"/>
        <text:user-field-decl office:value-type="string" office:string-value="" text:name="personne_qual"/>
        <text:user-field-decl office:value-type="string" office:string-value="" text:name="propoorientationcov58_rgorient"/>
        <text:user-field-decl office:value-type="string" office:string-value="" text:name="personne_numdemrsa"/>
        <text:user-field-decl office:value-type="string" office:string-value="" text:name="personne_inscritpe"/>
        <text:user-field-decl office:value-type="string" office:string-value="" text:name="dossier_numdemrsa"/>
        <text:user-field-decl office:value-type="string" office:string-value="" text:name="dossier_dtdemrsa"/>
        <text:user-field-decl office:value-type="string" office:string-value="" text:name="proporeorientationcov58_decisioncov"/>
        <text:user-field-decl office:value-type="string" office:string-value="" text:name="propoorientationcov58_structurereferente_lib_struc"/>
        <text:user-field-decl office:value-type="string" office:string-value="" text:name="propoorientationcov58_typeorient_lib_type_orient"/>
        <text:user-field-decl office:value-type="string" office:string-value="" text:name="proporeorientationcov58_typeorient_lib_type_orient"/>
        <text:user-field-decl office:value-type="string" office:string-value="" text:name="proporeorientationcov58_structurereferente_lib_struc"/>
      </text:user-field-decls>
      <text:h text:style-name="P4" text:outline-level="1">Procès verbal COV - <text:user-field-get style:data-style-name="N76" text:name="cov58_datecommission">30 décembre 1899</text:user-field-get></text:h>
      <text:p text:style-name="P1"/>
      <text:p text:style-name="P1"/>
      <table:table table:name="Decisionscovs58" table:style-name="Decisionscovs58">
        <table:table-column table:style-name="Decisionscovs58.A"/>
        <table:table-column table:style-name="Decisionscovs58.B"/>
        <table:table-column table:style-name="Decisionscovs58.C"/>
        <table:table-column table:style-name="Decisionscovs58.D"/>
        <table:table-column table:style-name="Decisionscovs58.E"/>
        <table:table-column table:style-name="Decisionscovs58.C"/>
        <table:table-column table:style-name="Decisionscovs58.G"/>
        <table:table-column table:style-name="Decisionscovs58.H"/>
        <table:table-column table:style-name="Decisionscovs58.I"/>
        <table:table-column table:style-name="Decisionscovs58.J"/>
        <table:table-header-rows>
          <table:table-row>
            <table:table-cell table:style-name="Decisionscovs58.A1" office:value-type="string">
              <text:p text:style-name="Table_20_Heading">N° allocataire</text:p>
            </table:table-cell>
            <table:table-cell table:style-name="Decisionscovs58.A1" office:value-type="string">
              <text:p text:style-name="Table_20_Heading">Nom</text:p>
            </table:table-cell>
            <table:table-cell table:style-name="Decisionscovs58.A1" office:value-type="string">
              <text:p text:style-name="Table_20_Heading">Date naissance</text:p>
            </table:table-cell>
            <table:table-cell table:style-name="Decisionscovs58.A1" office:value-type="string">
              <text:p text:style-name="Table_20_Heading">Adresse (ville)</text:p>
            </table:table-cell>
            <table:table-cell table:style-name="Decisionscovs58.A1" office:value-type="string">
              <text:p text:style-name="Table_20_Heading">Inscrit Pôle Emploi</text:p>
            </table:table-cell>
            <table:table-cell table:style-name="Decisionscovs58.A1" office:value-type="string">
              <text:p text:style-name="Table_20_Heading">Date entrée RSA</text:p>
            </table:table-cell>
            <table:table-cell table:style-name="Decisionscovs58.A1" office:value-type="string">
              <text:p text:style-name="Table_20_Heading">Motif présentation</text:p>
            </table:table-cell>
            <table:table-cell table:style-name="Decisionscovs58.A1" office:value-type="string">
              <text:p text:style-name="Table_20_Heading">Si Orientation</text:p>
            </table:table-cell>
            <table:table-cell table:style-name="Decisionscovs58.A1" office:value-type="string">
              <text:p text:style-name="Table_20_Heading">Si CER</text:p>
            </table:table-cell>
            <table:table-cell table:style-name="Decisionscovs58.J1" office:value-type="string">
              <text:p text:style-name="Table_20_Heading">Si Réorientation</text:p>
            </table:table-cell>
          </table:table-row>
        </table:table-header-rows>
        <table:table-row>
          <table:table-cell table:style-name="Decisionscovs58.A2" office:value-type="string">
            <text:p text:style-name="P3"><text:user-field-get text:name="dossier_numdemrsa"/></text:p>
          </table:table-cell>
          <table:table-cell table:style-name="Decisionscovs58.A2" office:value-type="string">
            <text:p text:style-name="P3"><text:user-field-get text:name="personne_qual"/> <text:user-field-get text:name="personne_prenom"/> <text:user-field-get text:name="personne_nom"/></text:p>
          </table:table-cell>
          <table:table-cell table:style-name="Decisionscovs58.A2" office:value-type="string">
            <text:p text:style-name="P3"><text:user-field-get text:name="personne_dtnai"/></text:p>
          </table:table-cell>
          <table:table-cell table:style-name="Decisionscovs58.A2" office:value-type="string">
            <text:p text:style-name="P3"><text:user-field-get text:name="adresse_nomcom"/></text:p>
          </table:table-cell>
          <table:table-cell table:style-name="Decisionscovs58.A2" office:value-type="string">
            <text:p text:style-name="P3"><text:user-field-get text:name="personne_inscritpe"/></text:p>
          </table:table-cell>
          <table:table-cell table:style-name="Decisionscovs58.A2" office:value-type="string">
            <text:p text:style-name="P3"><text:user-field-get text:name="dossier_dtdemrsa"/></text:p>
          </table:table-cell>
          <table:table-cell table:style-name="Decisionscovs58.A2" office:value-type="string">
            <text:p text:style-name="P3"><text:user-field-get text:name="themecov58_name"/></text:p>
          </table:table-cell>
          <table:table-cell table:style-name="Decisionscovs58.A2" office:value-type="string">
            <text:p text:style-name="P3"><text:conditional-text text:condition="ooow:propoorientationcov58_decisioncov != &quot;&quot;" text:string-value-if-true="Décision : " text:string-value-if-false="" text:current-value="true"/> <text:user-field-get text:name="propoorientationcov58_decisioncov"/></text:p>
            <text:p text:style-name="P3"><text:user-field-get text:name="propoorientationcov58_typeorient_lib_type_orient"/></text:p>
            <text:p text:style-name="P3"><text:user-field-get text:name="propoorientationcov58_structurereferente_lib_struc"/></text:p>
          </table:table-cell>
          <table:table-cell table:style-name="Decisionscovs58.A2" office:value-type="string">
            <text:p text:style-name="P3"><text:conditional-text text:condition="ooow:propocontratinsertioncov58_decisioncov != &quot;&quot;" text:string-value-if-true="Date début : " text:string-value-if-false="" text:current-value="true"/><text:user-field-get text:name="propocontratinsertioncov58_dd_ci"/></text:p>
            <text:p text:style-name="P3"><text:conditional-text text:condition="ooow:propocontratinsertioncov58_decisioncov != &quot;&quot;" text:string-value-if-true="Date fin : " text:string-value-if-false="" text:current-value="true"/><text:user-field-get text:name="propocontratinsertioncov58_df_ci"/></text:p>
            <text:p text:style-name="P3"><text:conditional-text text:condition="ooow:propocontratinsertioncov58_decisioncov != &quot;&quot;" text:string-value-if-true="Décision : " text:string-value-if-false="" text:current-value="true"/><text:user-field-get text:name="propocontratinsertioncov58_decisioncov"/></text:p>
          </table:table-cell>
          <table:table-cell table:style-name="Decisionscovs58.J2" office:value-type="string">
            <text:p text:style-name="P3"><text:conditional-text text:condition="ooow:proporeorientationcov58_decisioncov != &quot;&quot;" text:string-value-if-true="Décision : " text:string-value-if-false="" text:current-value="true"/> <text:user-field-get text:name="proporeorientationcov58_decisioncov"/></text:p>
            <text:p text:style-name="P3"><text:user-field-get text:name="proporeorientationcov58_typeorient_lib_type_orient"/></text:p>
            <text:p text:style-name="P3"><text:user-field-get text:name="proporeorientationcov58_structurereferente_lib_struc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dumont </meta:initial-creator>
    <meta:creation-date>2011-06-17T11:43:38</meta:creation-date>
    <dc:date>2011-06-20T16:10:23</dc:date>
    <dc:creator>gdumont </dc:creator>
    <meta:editing-duration>PT12H21M33S</meta:editing-duration>
    <meta:editing-cycles>85</meta:editing-cycles>
    <meta:generator>LibreOffice/3.3$Unix LibreOffice_project/330m19$Build-202</meta:generator>
    <meta:document-statistic meta:table-count="1" meta:image-count="0" meta:object-count="0" meta:page-count="1" meta:paragraph-count="27" meta:word-count="28" meta:character-count="197"/>
  </office:meta>
</office:document-meta>
</file>