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leau1" style:family="table">
      <style:table-properties style:width="17.145cm" fo:margin-left="-0.751cm" table:align="left" style:writing-mode="lr-tb"/>
    </style:style>
    <style:style style:name="Tableau1.A" style:family="table-column">
      <style:table-column-properties style:column-width="9.634cm"/>
    </style:style>
    <style:style style:name="Tableau1.B" style:family="table-column">
      <style:table-column-properties style:column-width="7.51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Decisionseps" style:family="table">
      <style:table-properties style:width="23.414cm" table:align="margins" style:writing-mode="lr-tb"/>
    </style:style>
    <style:style style:name="Decisionseps.A" style:family="table-column">
      <style:table-column-properties style:column-width="2.602cm" style:rel-column-width="7281*"/>
    </style:style>
    <style:style style:name="Decisionseps.A1" style:family="table-cell">
      <style:table-cell-properties fo:padding="0.097cm" fo:border-left="0.05pt solid #000000" fo:border-right="none" fo:border-top="0.05pt solid #000000" fo:border-bottom="0.05pt solid #000000"/>
    </style:style>
    <style:style style:name="Decisionseps.I1" style:family="table-cell">
      <style:table-cell-properties fo:padding="0.097cm" fo:border="0.05pt solid #000000"/>
    </style:style>
    <style:style style:name="Decisionseps.A2" style:family="table-cell">
      <style:table-cell-properties fo:padding="0.097cm" fo:border-left="0.05pt solid #000000" fo:border-right="none" fo:border-top="none" fo:border-bottom="0.05pt solid #000000"/>
    </style:style>
    <style:style style:name="Decisionseps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writing-mode="lr-tb"/>
    </style:style>
    <style:style style:name="P2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>
        <style:tab-stops>
          <style:tab-stop style:position="9.208cm"/>
        </style:tab-stops>
      </style:paragraph-properties>
      <style:text-properties fo:font-size="9pt" fo:font-weight="bold" style:font-size-complex="9pt" style:font-weight-complex="bold"/>
    </style:style>
    <style:style style:name="P5" style:family="paragraph" style:parent-style-name="Standard">
      <style:paragraph-properties style:writing-mode="lr-tb"/>
      <style:text-properties fo:font-weight="bold" style:font-weight-complex="bold"/>
    </style:style>
    <style:style style:name="P6" style:family="paragraph" style:parent-style-name="Standard">
      <style:paragraph-properties style:writing-mode="lr-tb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text-align="justify" style:justify-single-word="false" style:writing-mode="lr-tb"/>
    </style:style>
    <style:style style:name="P8" style:family="paragraph" style:parent-style-name="Standard">
      <style:paragraph-properties style:writing-mode="lr-tb"/>
      <style:text-properties style:language-asian="zh" style:country-asian="CN"/>
    </style:style>
    <style:style style:name="P9" style:family="paragraph" style:parent-style-name="Standard">
      <style:paragraph-properties fo:text-align="center" style:justify-single-word="false" style:writing-mode="lr-tb"/>
    </style:style>
    <style:style style:name="P10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style:writing-mode="lr-tb">
        <style:tab-stops>
          <style:tab-stop style:position="1.905cm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 style:writing-mode="lr-tb"/>
      <style:text-properties fo:font-size="11pt" style:text-underline-style="solid" style:text-underline-width="auto" style:text-underline-color="font-color" fo:font-weight="bold" style:font-size-complex="11pt" style:font-weight-complex="bold"/>
    </style:style>
    <style:style style:name="P14" style:family="paragraph" style:parent-style-name="Text_20_body">
      <style:paragraph-properties style:writing-mode="lr-tb">
        <style:tab-stops>
          <style:tab-stop style:position="1.905cm"/>
          <style:tab-stop style:position="2.223cm"/>
          <style:tab-stop style:position="5.715cm"/>
        </style:tab-stops>
      </style:paragraph-properties>
    </style:style>
    <style:style style:name="P15" style:family="paragraph" style:parent-style-name="heading_20_5">
      <style:paragraph-properties style:writing-mode="lr-tb"/>
      <style:text-properties fo:font-weight="normal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writing-mode="lr-tb"/>
    </style:style>
    <style:style style:name="P20" style:family="paragraph" style:parent-style-name="Text_20_body">
      <style:paragraph-properties fo:margin-top="0cm" fo:margin-bottom="0cm" style:writing-mode="lr-tb"/>
    </style:style>
    <style:style style:name="P21" style:family="paragraph" style:parent-style-name="Text_20_body">
      <style:paragraph-properties fo:margin-top="0cm" fo:margin-bottom="0cm" style:writing-mode="lr-tb"/>
      <style:text-properties style:font-name="Times New Roman"/>
    </style:style>
    <style:style style:name="P22" style:family="paragraph" style:parent-style-name="Text_20_body">
      <style:paragraph-properties fo:margin-top="0cm" fo:margin-bottom="0cm" style:writing-mode="lr-tb"/>
      <style:text-properties style:font-name="Times New Roman" style:font-name-complex="Times New Roman"/>
    </style:style>
    <style:style style:name="P23" style:family="paragraph" style:parent-style-name="Text_20_body">
      <style:paragraph-properties fo:margin-top="0cm" fo:margin-bottom="0cm" style:writing-mode="lr-tb">
        <style:tab-stops>
          <style:tab-stop style:position="9.252cm"/>
        </style:tab-stops>
      </style:paragraph-properties>
      <style:text-properties style:font-name="Times New Roman" style:font-name-complex="Times New Roman"/>
    </style:style>
    <style:style style:name="P24" style:family="paragraph" style:parent-style-name="Text_20_body">
      <style:paragraph-properties fo:margin-top="0cm" fo:margin-bottom="0cm" style:writing-mode="lr-tb">
        <style:tab-stops>
          <style:tab-stop style:position="9.252c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5" style:family="paragraph" style:parent-style-name="Text_20_body">
      <style:paragraph-properties fo:margin-top="0cm" fo:margin-bottom="0cm" style:writing-mode="lr-tb">
        <style:tab-stops>
          <style:tab-stop style:position="9.252cm"/>
        </style:tab-stops>
      </style:paragraph-properties>
      <style:text-properties style:font-name="Times New Roman" style:language-asian="zh" style:country-asian="CN" style:font-name-complex="Times New Roman"/>
    </style:style>
    <style:style style:name="P26" style:family="paragraph" style:parent-style-name="Text_20_body">
      <style:paragraph-properties fo:margin-top="0cm" fo:margin-bottom="0cm" style:writing-mode="lr-tb">
        <style:tab-stops>
          <style:tab-stop style:position="9.252cm"/>
        </style:tab-stops>
      </style:paragraph-properties>
      <style:text-properties style:language-asian="zh" style:country-asian="CN"/>
    </style:style>
    <style:style style:name="P27" style:family="paragraph" style:parent-style-name="Text_20_body">
      <style:paragraph-properties fo:margin-top="0cm" fo:margin-bottom="0cm" style:writing-mode="lr-tb">
        <style:tab-stops>
          <style:tab-stop style:position="9.502cm"/>
        </style:tab-stops>
      </style:paragraph-properties>
      <style:text-properties fo:font-size="9pt" style:font-size-complex="9pt"/>
    </style:style>
    <style:style style:name="P28" style:family="paragraph" style:parent-style-name="header">
      <style:paragraph-properties fo:margin-top="0cm" fo:margin-bottom="0cm" style:writing-mode="lr-tb"/>
    </style:style>
    <style:style style:name="P29" style:family="paragraph" style:parent-style-name="Text_20_body">
      <style:paragraph-properties fo:margin-top="0cm" fo:margin-bottom="0cm">
        <style:tab-stops>
          <style:tab-stop style:position="9.252c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30" style:family="paragraph" style:parent-style-name="Standard">
      <style:paragraph-properties fo:margin-left="0.025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</style:style>
    <style:style style:name="P31" style:family="paragraph" style:parent-style-name="Table_20_Heading">
      <style:text-properties fo:font-size="10pt" style:font-size-asian="10pt" style:font-size-complex="10pt"/>
    </style:style>
    <style:style style:name="P32" style:family="paragraph" style:parent-style-name="Standard">
      <style:paragraph-properties fo:margin-left="9.075cm" fo:margin-right="0cm" fo:margin-top="0cm" fo:margin-bottom="0cm" fo:text-align="start" style:justify-single-word="false" fo:text-indent="0cm" style:auto-text-indent="false" style:writing-mode="lr-tb">
        <style:tab-stops>
          <style:tab-stop style:position="9.502cm"/>
        </style:tab-stops>
      </style:paragraph-properties>
      <style:text-properties style:font-name="Times New Roman" style:font-name-complex="Times New Roman"/>
    </style:style>
    <style:style style:name="P33" style:family="paragraph" style:parent-style-name="Standard" style:master-page-name="Landscape">
      <style:paragraph-properties fo:margin-left="0.025cm" fo:margin-right="0cm" fo:text-align="start" style:justify-single-word="false" fo:text-indent="0cm" style:auto-text-indent="false" style:page-number="auto" fo:break-before="pag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</style:style>
    <style:style style:name="P34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5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36" style:family="paragraph" style:parent-style-name="header" style:master-page-name="Standard">
      <style:paragraph-properties style:page-number="auto" style:writing-mode="lr-tb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6" style:family="text">
      <style:text-properties style:text-underline-style="solid" style:text-underline-width="auto" style:text-underline-color="font-color" fo:font-weight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-asian="Times New Roman"/>
    </style:style>
    <style:style style:name="T10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ructure_lib_struc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" text:name="nonrespectsanctionep93_decisionnonrespectsanctionep93_0_decision"/>
        <text:user-field-decl office:value-type="string" office:string-value="" text:name="saisineepreorientsr93_nvsrepreorientsr93_0_decision"/>
        <text:user-field-decl office:value-type="string" office:string-value="membreep_qual" text:name="membreep_qual"/>
        <text:user-field-decl office:value-type="string" office:string-value="membreep_nom" text:name="membreep_nom"/>
        <text:user-field-decl office:value-type="string" office:string-value="membreep_prenom" text:name="membreep_prenom"/>
        <text:user-field-decl office:value-type="string" office:string-value="membreep_fonctionmembre" text:name="membreep_fonctionmembreep_name"/>
        <text:user-field-decl office:value-type="string" office:string-value="" text:name="decisionnonrespectsanctionep93_decision"/>
        <text:user-field-decl office:value-type="string" office:string-value="" text:name="nvsrepreorientsr93_decision"/>
        <text:user-field-decl office:value-type="float" office:value="0" text:name="seanceep_dateseance"/>
        <text:user-field-decl office:value-type="string" office:string-value="dossierep_themeep" text:name="dossierep_themeep"/>
        <text:user-field-decl office:value-type="string" office:string-value="" text:name="decisionreorientationep93_decision"/>
        <text:user-field-decl office:value-type="float" office:value="0" text:name="adresse_codepos"/>
        <text:user-field-decl office:value-type="string" office:string-value="commissionep_dateseance" text:name="commissionep_dateseance"/>
        <text:user-field-decl office:value-type="string" office:string-value="" text:name="nonrespectsanctionep93_decision"/>
        <text:user-field-decl office:value-type="string" office:string-value="commissionep_dateseance_time" text:name="commissionep_dateseance_time"/>
        <text:user-field-decl office:value-type="string" office:string-value="ep_identifiant" text:name="ep_identifiant"/>
        <text:user-field-decl office:value-type="string" office:string-value="commissionep_lieuseance" text:name="commissionep_lieuseance"/>
        <text:user-field-decl office:value-type="string" office:string-value="" text:name="decisionnonorientationproep93_decision"/>
        <text:user-field-decl office:value-type="string" office:string-value="" text:name="decisionsignalementep93_decision"/>
        <text:user-field-decl office:value-type="string" office:string-value="" text:name="decisioncontratcomplexeep93_decision"/>
        <text:user-field-decl office:value-type="string" office:string-value="adresse_nomcom" text:name="adresse_nomcom"/>
        <text:user-field-decl office:value-type="string" office:string-value="" text:name="decisionsanctionep58_decision"/>
        <text:user-field-decl office:value-type="string" office:string-value="" text:name="decisionnonorientationproep58_decision"/>
        <text:user-field-decl office:value-type="string" office:string-value="" text:name="decisionnonorientationproep66_decision"/>
        <text:user-field-decl office:value-type="string" office:string-value="" text:name="decisionregressionorientationep58_decision"/>
        <text:user-field-decl office:value-type="string" office:string-value="" text:name="decisionregressionorientationep66_decision"/>
        <text:user-field-decl office:value-type="string" office:string-value="" text:name="decisionregressionorientationep93_decision"/>
        <text:user-field-decl office:value-type="string" office:string-value="" text:name="decisionsaisinebilanparcoursep66_decision"/>
        <text:user-field-decl office:value-type="string" office:string-value="" text:name="decisionsaisinepdoep66_decision"/>
        <text:user-field-decl office:value-type="string" office:string-value="" text:name="decisionsanctionrendezvousep58_decision"/>
        <text:user-field-decl office:value-type="string" office:string-value="" text:name="decisiondefautinsertionep93_decision"/>
        <text:user-field-decl office:value-type="string" office:string-value="decisiondefautinsertionep66_decision" text:name="decisiondefautinsertionep66_decision"/>
        <text:user-field-decl office:value-type="string" office:string-value="user_numtel" text:name="user_numtel"/>
        <text:user-field-decl office:value-type="string" office:string-value="commissionep_chargesuivi" text:name="commissionep_chargesuivi"/>
        <text:user-field-decl office:value-type="string" office:string-value="participant_codepostal" text:name="participant_codepostal"/>
        <text:user-field-decl office:value-type="string" office:string-value="participant_ville" text:name="participant_ville"/>
        <text:user-field-decl office:value-type="string" office:string-value="participant_qual" text:name="participant_qual"/>
        <text:user-field-decl office:value-type="string" office:string-value="participant_nom" text:name="participant_nom"/>
        <text:user-field-decl office:value-type="string" office:string-value="participant_prenom" text:name="participant_prenom"/>
        <text:user-field-decl office:value-type="string" office:string-value="participant_numvoie" text:name="participant_numvoie"/>
        <text:user-field-decl office:value-type="string" office:string-value="participant_typevoie" text:name="participant_typevoie"/>
        <text:user-field-decl office:value-type="string" office:string-value="participant_nomvoie" text:name="participant_nomvoie"/>
        <text:user-field-decl office:value-type="string" office:string-value="participant_compladr" text:name="participant_compladr"/>
        <text:user-field-decl office:value-type="string" office:string-value="personne_nir" text:name="personne_nir"/>
        <text:user-field-decl office:value-type="string" office:string-value="personne_dtnai" text:name="personne_dtnai"/>
        <text:user-field-decl office:value-type="string" office:string-value="defautinsertionep66_origine" text:name="defautinsertionep66_origine"/>
        <text:user-field-decl office:value-type="string" office:string-value="commissionep_observations" text:name="commissionep_observations"/>
        <text:user-field-decl office:value-type="float" office:value="0" text:name="commissionep_name"/>
        <text:user-field-decl office:value-type="string" office:string-value="ep_name" text:name="ep_name"/>
        <text:user-field-decl office:value-type="string" office:string-value="adresse_compladr" text:name="adresse_compladr"/>
        <text:user-field-decl office:value-type="string" office:string-value="adresse_numvoie" text:name="adresse_numvoie"/>
        <text:user-field-decl office:value-type="string" office:string-value="adresse_libtypevoie" text:name="adresse_libtypevoie"/>
        <text:user-field-decl office:value-type="string" office:string-value="adresse_nomvoie" text:name="adresse_nomvoie"/>
        <text:user-field-decl office:value-type="string" office:string-value="adresse_complideadr" text:name="adresse_complideadr"/>
        <text:user-field-decl office:value-type="string" office:string-value="structurereferentedecbilan66_lib_struc" text:name="structurereferentedecbilan66_lib_struc"/>
        <text:user-field-decl office:value-type="string" office:string-value="referentdecbilan66_nom" text:name="referentdecbilan66_nom"/>
        <text:user-field-decl office:value-type="string" office:string-value="referentdecbilan66_prenom" text:name="referentdecbilan66_prenom"/>
        <text:user-field-decl office:value-type="string" office:string-value="user_ville" text:name="user_ville"/>
        <text:user-field-decl office:value-type="string" office:string-value="decisiondefautinsertionep66_decisionsup" text:name="decisiondefautinsertionep66_decisionsup"/>
        <text:user-field-decl office:value-type="string" office:string-value="structurereferentebilan_lib_struc" text:name="structurereferentebilan_lib_struc"/>
        <text:user-field-decl office:value-type="string" office:string-value="referentbilan_nom" text:name="referentbilan_nom"/>
        <text:user-field-decl office:value-type="string" office:string-value="referentbilan_prenom" text:name="referentbilan_prenom"/>
      </text:user-field-decls>
      <text:p text:style-name="P36"/>
      <text:p text:style-name="P1"/>
      <text:p text:style-name="P1"/>
      <text:p text:style-name="P1"/>
      <text:p text:style-name="P1"/>
      <text:p text:style-name="P28"/>
      <text:p text:style-name="P28"/>
      <text:p text:style-name="P28"/>
      <text:p text:style-name="P19"/>
      <text:p text:style-name="P19"/>
      <text:p text:style-name="P32"><text:user-field-get text:name="user_ville">user_ville</text:user-field-get>, le <text:span text:style-name="T5"><text:date style:data-style-name="N76" text:date-value="2012-11-23T11:39:02">23 novembre 2012</text:date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5">Direction des Politiques Sociales</text:p>
            <text:p text:style-name="P22">Cellule de Gestion de l'allocation RSA</text:p>
            <text:p text:style-name="P21">25, <text:s/>rue petite la monnaie</text:p>
            <text:p text:style-name="P23">66 000 Perpignan Cedex</text:p>
            <text:p text:style-name="P20"><text:s text:c="4"/></text:p>
          </table:table-cell>
          <table:table-cell table:style-name="Tableau1.A1" office:value-type="string">
            <text:p text:style-name="P26"><text:s/></text:p>
            <text:p text:style-name="P29"><text:span text:style-name="T9"><text:user-field-get text:name="participant_qual">participant_qual</text:user-field-get></text:span><text:span text:style-name="T9"> </text:span><text:span text:style-name="T9"><text:user-field-get text:name="participant_nom">participant_nom</text:user-field-get></text:span><text:span text:style-name="T9"> </text:span><text:span text:style-name="T9"><text:user-field-get text:name="participant_prenom">participant_prenom</text:user-field-get></text:span></text:p>
            <text:p text:style-name="P29"><text:user-field-get text:name="participant_numvoie">participant_numvoie</text:user-field-get> <text:user-field-get text:name="participant_typevoie">participant_typevoie</text:user-field-get> <text:user-field-get text:name="participant_nomvoie">participant_nomvoie</text:user-field-get></text:p>
            <text:p text:style-name="P29"><text:user-field-get text:name="participant_compladr">participant_compladr</text:user-field-get></text:p>
            <text:p text:style-name="P24"><text:user-field-get text:name="participant_codepostal">participant_codepostal</text:user-field-get> <text:user-field-get text:name="participant_ville">participant_ville</text:user-field-get></text:p>
          </table:table-cell>
        </table:table-row>
      </table:table>
      <text:p text:style-name="P27"/>
      <text:p text:style-name="P4"/>
      <text:p text:style-name="P2"/>
      <text:p text:style-name="P5"/>
      <text:p text:style-name="P8">Dossier suivi par : <text:span text:style-name="T3"><text:user-field-get text:name="commissionep_chargesuivi">commissionep_chargesuivi</text:user-field-get></text:span></text:p>
      <text:h text:style-name="P15" text:outline-level="5"><text:span text:style-name="T1"><text:s/></text:span><text:span text:style-name="T2">Tél</text:span><text:span text:style-name="T1"> <text:s/>: </text:span><text:span text:style-name="T2"><text:user-field-get text:name="user_numtel">user_numtel</text:user-field-get></text:span></text:h>
      <text:p text:style-name="P3"/>
      <text:p text:style-name="P3"><text:span text:style-name="T6">Objet :</text:span> <text:s/>Procès verbal de l'Equipe Pluridisciplinaire Locale Audition. </text:p>
      <text:p text:style-name="P3"/>
      <text:p text:style-name="P6"><text:s text:c="18"/><text:span text:style-name="T4"><text:user-field-get text:name="participant_qual">participant_qual</text:user-field-get></text:span>, </text:p>
      <text:p text:style-name="P3"/>
      <text:p text:style-name="P14"><text:tab/>Veuillez trouver ci-joint la copie du procès verbal de la séance de l'Equipe Pluridisciplinaire Locale Commission Audition du <text:span text:style-name="T7"><text:user-field-get text:name="commissionep_dateseance">commissionep_dateseance</text:user-field-get></text:span><text:span text:style-name="T7"> à l'</text:span><text:span text:style-name="T7"><text:user-field-get text:name="ep_name">ep_name</text:user-field-get></text:span><text:span text:style-name="T8">.</text:span></text:p>
      <text:p text:style-name="P10"><text:tab/><text:span text:style-name="T10">Ont confirmé leur présence :</text:span></text:p>
      <text:section text:style-name="Sect1" text:name="Presences_present">
        <text:p text:style-name="P17"><text:tab/><text:tab/>- <text:user-field-get text:name="membreep_qual">membreep_qual</text:user-field-get> <text:user-field-get text:name="membreep_nom">membreep_nom</text:user-field-get> <text:user-field-get text:name="membreep_prenom">membreep_prenom</text:user-field-get>, <text:user-field-get text:name="membreep_fonctionmembreep_name">membreep_fonctionmembre</text:user-field-get></text:p>
      </text:section>
      <text:p text:style-name="P10"/>
      <text:p text:style-name="P10"><text:tab/>Membres absents excusés :</text:p>
      <text:section text:style-name="Sect1" text:name="Presences_excuse">
        <text:p text:style-name="P18"><text:tab/><text:tab/>- <text:user-field-get text:name="membreep_qual">membreep_qual</text:user-field-get> <text:user-field-get text:name="membreep_nom">membreep_nom</text:user-field-get> <text:user-field-get text:name="membreep_prenom">membreep_prenom</text:user-field-get>, <text:user-field-get text:name="membreep_fonctionmembreep_name">membreep_fonctionmembre</text:user-field-get></text:p>
      </text:section>
      <text:p text:style-name="P10"/>
      <text:p text:style-name="P10"><text:tab/><text:span text:style-name="T10">N'ont pas renseigné leur présence :</text:span></text:p>
      <text:section text:style-name="Sect1" text:name="Presences_absent">
        <text:p text:style-name="P17"><text:span text:style-name="T10"><text:tab/><text:tab/>- </text:span><text:span text:style-name="T10"><text:user-field-get text:name="membreep_qual">membreep_qual</text:user-field-get></text:span><text:span text:style-name="T10"> </text:span><text:span text:style-name="T10"><text:user-field-get text:name="membreep_nom">membreep_nom</text:user-field-get></text:span><text:span text:style-name="T10"> </text:span><text:span text:style-name="T10"><text:user-field-get text:name="membreep_prenom">membreep_prenom</text:user-field-get></text:span><text:span text:style-name="T10">, </text:span><text:span text:style-name="T10"><text:user-field-get text:name="membreep_fonctionmembreep_name">membreep_fonctionmembre</text:user-field-get></text:span></text:p>
      </text:section>
      <text:p text:style-name="P12"/>
      <text:p text:style-name="P12"><text:tab/><text:span text:style-name="T10">Seront remplacés :</text:span></text:p>
      <text:section text:style-name="Sect1" text:name="Section4">
        <text:p text:style-name="P17"><text:tab/><text:tab/>- <text:user-field-get text:name="membreep_qual">membreep_qual</text:user-field-get> <text:user-field-get text:name="membreep_nom">membreep_nom</text:user-field-get> <text:user-field-get text:name="membreep_prenom">membreep_prenom</text:user-field-get>, <text:user-field-get text:name="membreep_fonctionmembreep_name">membreep_fonctionmembre</text:user-field-get></text:p>
      </text:section>
      <text:p text:style-name="P10"/>
      <text:p text:style-name="P11"><text:tab/> <text:s text:c="5"/>Pour transmission,</text:p>
      <text:p text:style-name="P3"><text:tab/><text:tab/><text:tab/><text:tab/><text:tab/><text:tab/><text:tab/>Le Responsable MSP</text:p>
      <text:p text:style-name="P30"/>
      <text:p text:style-name="P33"/>
      <text:p text:style-name="P9">PROCES VERBAL EQUIPE PLURIDISCIPLINAIRE LOCALE COMMISSION AUDITION DU <text:span text:style-name="T7"><text:user-field-get text:name="commissionep_dateseance">commissionep_dateseance</text:user-field-get></text:span></text:p>
      <text:p text:style-name="P13"/>
      <table:table table:name="Decisionseps" table:style-name="Decisionseps">
        <table:table-column table:style-name="Decisionseps.A" table:number-columns-repeated="9"/>
        <table:table-header-rows>
          <table:table-row>
            <table:table-cell table:style-name="Decisionseps.A1" office:value-type="string">
              <text:p text:style-name="P35">Nom Prénom</text:p>
            </table:table-cell>
            <table:table-cell table:style-name="Decisionseps.A1" office:value-type="string">
              <text:p text:style-name="P35">Adresse</text:p>
            </table:table-cell>
            <table:table-cell table:style-name="Decisionseps.A1" office:value-type="string">
              <text:p text:style-name="P35">Ville</text:p>
            </table:table-cell>
            <table:table-cell table:style-name="Decisionseps.A1" office:value-type="string">
              <text:p text:style-name="P35">N° Allocataire</text:p>
            </table:table-cell>
            <table:table-cell table:style-name="Decisionseps.A1" office:value-type="string">
              <text:p text:style-name="P35">Date de naissance</text:p>
            </table:table-cell>
            <table:table-cell table:style-name="Decisionseps.A1" office:value-type="string">
              <text:p text:style-name="P35">Structure Référente</text:p>
            </table:table-cell>
            <table:table-cell table:style-name="Decisionseps.A1" office:value-type="string">
              <text:p text:style-name="P35">Référent</text:p>
            </table:table-cell>
            <table:table-cell table:style-name="Decisionseps.A1" office:value-type="string">
              <text:p text:style-name="P35">Motif du passage en EPL</text:p>
            </table:table-cell>
            <table:table-cell table:style-name="Decisionseps.I1" office:value-type="string">
              <text:p text:style-name="P35">Avis rendu</text:p>
            </table:table-cell>
          </table:table-row>
        </table:table-header-rows>
        <table:table-row>
          <table:table-cell table:style-name="Decisionseps.A2" office:value-type="string">
            <text:p text:style-name="P16"><text:user-field-get text:name="personne_nom">personne_nom</text:user-field-get> <text:user-field-get text:name="personne_prenom">personne_prenom</text:user-field-get></text:p>
          </table:table-cell>
          <table:table-cell table:style-name="Decisionseps.A2" office:value-type="string">
            <text:p text:style-name="P16"><text:user-field-get text:name="adresse_numvoie">adresse_numvoie</text:user-field-get> <text:user-field-get text:name="adresse_libtypevoie">adresse_libtypevoie</text:user-field-get> <text:user-field-get text:name="adresse_nomvoie">adresse_nomvoie</text:user-field-get> <text:user-field-get text:name="adresse_complideadr">adresse_complideadr</text:user-field-get> <text:user-field-get text:name="adresse_compladr">adresse_compladr</text:user-field-get></text:p>
          </table:table-cell>
          <table:table-cell table:style-name="Decisionseps.A2" office:value-type="string">
            <text:p text:style-name="P16"><text:user-field-get text:name="adresse_nomcom">adresse_nomcom</text:user-field-get></text:p>
          </table:table-cell>
          <table:table-cell table:style-name="Decisionseps.A2" office:value-type="string">
            <text:p text:style-name="P16"><text:user-field-get text:name="personne_nir">personne_nir</text:user-field-get></text:p>
          </table:table-cell>
          <table:table-cell table:style-name="Decisionseps.A2" office:value-type="string">
            <text:p text:style-name="P16"><text:user-field-get text:name="personne_dtnai">personne_dtnai</text:user-field-get></text:p>
          </table:table-cell>
          <table:table-cell table:style-name="Decisionseps.A2" office:value-type="string">
            <text:p text:style-name="P16"><text:user-field-get text:name="structurereferentebilan_lib_struc">structurereferentebilan_lib_struc</text:user-field-get></text:p>
          </table:table-cell>
          <table:table-cell table:style-name="Decisionseps.A2" office:value-type="string">
            <text:p text:style-name="P16"><text:user-field-get text:name="referentbilan_nom">referentbilan_nom</text:user-field-get> <text:user-field-get text:name="referentbilan_prenom">referentbilan_prenom</text:user-field-get></text:p>
          </table:table-cell>
          <table:table-cell table:style-name="Decisionseps.A2" office:value-type="string">
            <text:p text:style-name="P16"><text:user-field-get text:name="dossierep_themeep">dossierep_themeep</text:user-field-get> <text:user-field-get text:name="defautinsertionep66_origine">defautinsertionep66_origine</text:user-field-get></text:p>
          </table:table-cell>
          <table:table-cell table:style-name="Decisionseps.I2" office:value-type="string">
            <text:p text:style-name="P16"><text:user-field-get text:name="decisiondefautinsertionep66_decision">decisiondefautinsertionep66_decision</text:user-field-get></text:p>
            <text:p text:style-name="P16"/>
            <text:p text:style-name="P16"><text:hidden-paragraph text:condition="ooow:decisiondefautinsertionep66_decisionsup == &quot;&quot;"/> - <text:user-field-get text:name="decisiondefautinsertionep66_decisionsup">decisiondefautinsertionep66_decisionsup</text:user-field-get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="100%" fo:margin-left="1.249cm" fo:margin-right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0.953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>
      <style:paragraph-properties fo:text-align="justify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4.286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0-10-25T16:44:00</meta:print-date>
    <meta:generator>LibreOffice/3.5$Linux_X86_64 LibreOffice_project/350m1$Build-2</meta:generator>
    <dc:date>2012-11-23T11:39:02</dc:date>
    <meta:editing-duration>PT14H58M30S</meta:editing-duration>
    <meta:editing-cycles>77</meta:editing-cycles>
    <dc:creator>Arnaud Auzolat</dc:creator>
    <meta:document-statistic meta:table-count="2" meta:image-count="0" meta:object-count="0" meta:page-count="2" meta:paragraph-count="46" meta:word-count="161" meta:character-count="1658" meta:non-whitespace-character-count="1483"/>
  </office:meta>
</office:document-meta>
</file>