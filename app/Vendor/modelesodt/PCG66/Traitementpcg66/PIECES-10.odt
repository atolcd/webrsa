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096cm" style:rel-column-width="4590*"/>
    </style:style>
    <style:style style:name="Tableau1.B" style:family="table-column">
      <style:table-column-properties style:column-width="7.114cm" style:rel-column-width="4033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Times New Roman" fo:font-size="10pt" fo:language="fr" fo:country="FR" style:letter-kerning="true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pt" fo:language="fr" fo:country="FR" style:letter-kerning="true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style:text-autospace="none">
        <style:tab-stops>
          <style:tab-stop style:position="9.252cm"/>
        </style:tab-stops>
      </style:paragraph-properties>
    </style:style>
    <style:style style:name="P13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style:letter-kerning="true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</style:style>
    <style:style style:name="P21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22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7pt" fo:language="fr" fo:country="FR" fo:font-style="normal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23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4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P26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T2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3" style:family="text"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style:font-name="Arial" fo:font-style="normal" fo:font-weight="normal"/>
    </style:style>
    <style:style style:name="T7" style:family="text"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0pt" fo:language="fr" fo:country="FR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fo:font-size="12pt" fo:language="fr" fo:country="FR" style:font-name-asian="Arial" style:font-size-asian="12pt" style:font-name-complex="Arial" style:font-size-complex="12pt"/>
    </style:style>
    <style:style style:name="T10" style:family="text">
      <style:text-properties fo:font-size="12pt" fo:language="fr" fo:country="FR" style:font-name-asian="Times New Roman" style:font-size-asian="12pt" style:font-name-complex="Times New Roman" style:font-size-complex="12pt"/>
    </style:style>
    <style:style style:name="T11" style:family="text">
      <style:text-properties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weight="bold" style:font-weight-asian="bold" style:font-weight-complex="bol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</text:user-field-decls>
      <text:p text:style-name="P21"><text:s text:c="70"/>Perpignan, <text:span text:style-name="T14"><text:date style:data-style-name="N76" text:date-value="2012-07-17T15:05:10.75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Direction des Politiques Sociales</text:p>
            <text:p text:style-name="P3">Cellule de Gestion de l'Allocation rSa</text:p>
            <text:p text:style-name="P3">25 Rue Petite la Monnaie</text:p>
            <text:p text:style-name="P3">66  <text:s/>000 PERPIGNAN</text:p>
            <text:p text:style-name="P25"><text:span text:style-name="T9">Suivi Par  <text:s/>: </text:span><text:span text:style-name="T10"><text:user-field-get text:name="dossierpcg66_user_nom_complet">dossierpcg66_user_nom_complet</text:user-field-get></text:span></text:p>
            <text:p text:style-name="P3">Tél : 04.68.854.854</text:p>
          </table:table-cell>
          <table:table-cell table:style-name="Tableau1.A1" office:value-type="string">
            <text:p text:style-name="P26"><text:user-field-get text:name="personne_qual">qual</text:user-field-get> <text:user-field-get text:name="personne_nom">nom</text:user-field-get> <text:user-field-get text:name="personne_prenom">prenom</text:user-field-get></text:p>
            <text:p text:style-name="P26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6"><text:user-field-get text:name="adresse_complideadr">complideadr</text:user-field-get></text:p>
            <text:p text:style-name="P26"><text:user-field-get text:name="adresse_compladr">compladr</text:user-field-get></text:p>
            <text:p text:style-name="P27"><text:user-field-get text:name="adresse_codepos">codepos</text:user-field-get> <text:user-field-get text:name="adresse_nomcom">locaadr</text:user-field-get></text:p>
          </table:table-cell>
        </table:table-row>
      </table:table>
      <text:p text:style-name="P22"><text:span text:style-name="T12">Référence : </text:span><text:span text:style-name="T13"><text:user-field-get text:name="dossier_matricule">matricule</text:user-field-get></text:span></text:p>
      <text:p text:style-name="P22"><text:span text:style-name="T13"/></text:p>
      <text:p text:style-name="P7">Objet : suspension rSa / information tardive d'exercice d'une activité non salariée non agricole</text:p>
      <text:p text:style-name="P14"/>
      <text:p text:style-name="P14"/>
      <text:p text:style-name="P14"/>
      <text:p text:style-name="P14"/>
      <text:p text:style-name="P1"><text:user-field-get text:name="personne_qual">qual</text:user-field-get>,</text:p>
      <text:p text:style-name="P2"/>
      <text:p text:style-name="P8"><text:tab/>Vous êtes bénéficiaire de l'allocation rSa et vous exercez une activité non salariée.</text:p>
      <text:p text:style-name="P15"/>
      <text:p text:style-name="P8"><text:tab/>Dès lors, votre droit au rSa doit être révisé en tenant compte du résultat de votre activité de l'année précédente, en l'occurrence l'année xx.</text:p>
      <text:p text:style-name="P8"/>
      <text:p text:style-name="P8"><text:tab/>Dans ce cadre, les éléments en notre possession sont insuffisants et <text:s/>ne permettent pas la révision de votre dossier.</text:p>
      <text:p text:style-name="P11"/>
      <text:p text:style-name="P8"><text:tab/>Nous trouvant dans l'impossibilité de procéder à l’évaluation de vos revenus et dès lors, de nous prononcer sur la révision <text:s/>du droit au rSa, le versement de votre allocation a été suspendu.</text:p>
      <text:p text:style-name="P8"/>
      <text:p text:style-name="P8"><text:tab/>Cependant celui-ci pourra, si les conditions légales sont remplies, être repris dès que vous aurez adressé les justificatifs correspondant à votre activité <text:s/>:</text:p>
      <text:p text:style-name="P11"/>
      <text:p text:style-name="P8"><text:s text:c="2"/></text:p>
      <text:p text:style-name="P8"><text:tab/>Nous vous invitons à <text:s/>transmettre ces documents dans les plus brefs délais. A l'issue de 3 mois de suspension votre dossier serait radié. </text:p>
      <text:p text:style-name="P11"/>
      <text:p text:style-name="P9"><text:s/><text:tab/>Je vous prie d'agréer, <text:span text:style-name="T11"><text:user-field-get text:name="personne_qual">qual</text:user-field-get></text:span>, l’expression de mes sincères salutations.</text:p>
      <text:p text:style-name="P10"><text:s text:c="15"/></text:p>
      <text:p text:style-name="P17"><text:span text:style-name="T4"><text:s/></text:span><text:span text:style-name="T5">Pour la Présidente du Conseil Général </text:span></text:p>
      <text:p text:style-name="P18">et Par Délégation</text:p>
      <text:p text:style-name="P19">Le Directeur des Politiques Sociales</text:p>
      <text:p text:style-name="P20"><text:span text:style-name="T3"><text:s text:c="91"/></text:span><text:span text:style-name="T5">Françoise ILLES</text:span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5:05:10.72</dc:date>
    <meta:generator>LibreOffice/3.4$Win32 LibreOffice_project/340m1$Build-502</meta:generator>
    <meta:editing-duration>PT2H27M32S</meta:editing-duration>
    <meta:editing-cycles>41</meta:editing-cycles>
    <dc:creator>Florent DUBOIS</dc:creator>
    <meta:document-statistic meta:table-count="1" meta:image-count="0" meta:object-count="0" meta:page-count="1" meta:paragraph-count="28" meta:word-count="217" meta:character-count="1591" meta:non-whitespace-character-count="1202"/>
  </office:meta>
</office:document-meta>
</file>