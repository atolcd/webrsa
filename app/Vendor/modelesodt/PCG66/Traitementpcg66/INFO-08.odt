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9.287cm" style:rel-column-width="40014*"/>
    </style:style>
    <style:style style:name="Tableau1.B" style:family="table-column">
      <style:table-column-properties style:column-width="5.923cm" style:rel-column-width="25521*"/>
    </style:style>
    <style:style style:name="Tableau1.1" style:family="table-row">
      <style:table-row-properties style:min-row-height="3.519cm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officeooo:paragraph-rsid="0009e9b3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officeooo:rsid="0010f8f3" officeooo:paragraph-rsid="0009e9b3" style:font-name-asian="Arial" style:font-size-asian="12pt" style:font-name-complex="Arial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style="italic" fo:font-weight="bold" officeooo:paragraph-rsid="001165a2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style:letter-kerning="true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officeooo:paragraph-rsid="001165a2" style:letter-kerning="true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officeooo:paragraph-rsid="000f4a45" style:letter-kerning="true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officeooo:paragraph-rsid="001b7875" style:letter-kerning="true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style:text-autospace="none"/>
      <style:text-properties style:font-name="Arial" fo:font-size="12pt" fo:language="fr" fo:country="FR" style:letter-kerning="true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weight="normal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weight="normal" officeooo:paragraph-rsid="001269f5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style:text-autospace="none">
        <style:tab-stops>
          <style:tab-stop style:position="5.398cm"/>
        </style:tab-stops>
      </style:paragraph-properties>
      <style:text-properties style:font-name="Arial" fo:font-size="11pt" fo:language="fr" fo:country="FR" fo:font-style="normal" fo:font-weight="bold" officeooo:paragraph-rsid="000bba72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style:text-autospace="none"/>
      <style:text-properties style:font-name="Arial" fo:font-size="11pt" fo:language="fr" fo:country="FR" officeooo:rsid="00223cdf" style:font-name-asian="Arial" style:font-size-asian="11pt" style:font-name-complex="Arial" style:font-size-complex="11pt"/>
    </style:style>
    <style:style style:name="P21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ize="11pt" fo:language="fr" fo:country="FR" fo:font-style="normal" fo:font-weight="normal" style:font-name-asian="Arial" style:font-size-asian="11pt" style:font-name-complex="Arial" style:font-size-complex="11pt"/>
    </style:style>
    <style:style style:name="P22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/>
    </style:style>
    <style:style style:name="P23" style:family="paragraph" style:parent-style-name="Standard">
      <style:paragraph-properties style:writing-mode="lr-tb"/>
      <style:text-properties style:font-name="Arial" officeooo:paragraph-rsid="000bba72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Arial" officeooo:paragraph-rsid="000bba72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7.488cm"/>
        </style:tab-stops>
      </style:paragraph-properties>
      <style:text-properties style:font-name="Arial" officeooo:paragraph-rsid="000bba72"/>
    </style:style>
    <style:style style:name="P2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0bba72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7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0bba72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style:font-name="Arial" fo:font-size="11pt" fo:language="fr" fo:country="FR" fo:font-style="normal" fo:font-weight="bold" officeooo:paragraph-rsid="000bba72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officeooo:paragraph-rsid="000bba72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style:letter-kerning="true" style:font-name-asian="Times New Roman" style:font-size-asian="12pt" style:font-name-complex="Times New Roman" style:font-size-complex="12pt"/>
    </style:style>
    <style:style style:name="P33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P34" style:family="paragraph" style:parent-style-name="Standard" style:list-style-name="L1">
      <style:paragraph-properties fo:text-align="justify" style:justify-single-word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font-size="12pt" fo:language="fr" fo:country="FR" style:font-name-asian="Arial" style:font-size-asian="12pt" style:font-name-complex="Arial" style:font-size-complex="12pt"/>
    </style:style>
    <style:style style:name="T2" style:family="text">
      <style:text-properties fo:font-size="12pt" fo:language="fr" fo:country="FR" style:font-name-asian="Times New Roman" style:font-size-asian="12pt" style:font-name-complex="Times New Roman" style:font-size-complex="12pt"/>
    </style:style>
    <style:style style:name="T3" style:family="text">
      <style:text-properties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4" style:family="text">
      <style:text-properties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size="11pt" fo:language="fr" fo:country="FR" fo:font-style="normal" fo:font-weight="bold" officeooo: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style:text-underline-style="solid" style:text-underline-width="auto" style:text-underline-color="font-color" officeooo:rsid="00125ab5"/>
    </style:style>
    <style:style style:name="T10" style:family="text">
      <style:text-properties style:text-underline-style="solid" style:text-underline-width="auto" style:text-underline-color="font-color" officeooo:rsid="001269f5"/>
    </style:style>
    <style:style style:name="T11" style:family="text">
      <style:text-properties fo:language="fr" fo:country="FR" fo:font-weight="bold" style:letter-kerning="true" style:font-name-asian="Times New Roman" style:font-weight-asian="bold" style:font-name-complex="Times New Roman" style:font-weight-complex="bold"/>
    </style:style>
    <style:style style:name="T12" style:family="text">
      <style:text-properties officeooo:rsid="0007d6a9"/>
    </style:style>
    <style:style style:name="T13" style:family="text">
      <style:text-properties officeooo:rsid="000b53d1"/>
    </style:style>
    <style:style style:name="T14" style:family="text">
      <style:text-properties officeooo:rsid="0010f8f3"/>
    </style:style>
    <style:style style:name="T15" style:family="text">
      <style:text-properties fo:color="#ffffff" fo:background-color="transparent"/>
    </style:style>
    <style:style style:name="T16" style:family="text">
      <style:text-properties officeooo:rsid="0018dae7"/>
    </style:style>
    <style:style style:name="T17" style:family="text">
      <style:text-properties officeooo:rsid="000f9420"/>
    </style:style>
    <style:style style:name="T18" style:family="text">
      <style:text-properties officeooo:rsid="001165a2"/>
    </style:style>
    <style:style style:name="T19" style:family="text">
      <style:text-properties officeooo:rsid="00110eaa"/>
    </style:style>
    <style:style style:name="T20" style:family="text">
      <style:text-properties fo:font-weight="bold" officeooo:rsid="001165a2" style:font-weight-asian="bold" style:font-weight-complex="bold"/>
    </style:style>
    <style:style style:name="T21" style:family="text">
      <style:text-properties fo:font-weight="normal" officeooo:rsid="001165a2" style:font-weight-asian="normal" style:font-weight-complex="normal"/>
    </style:style>
    <style:style style:name="T22" style:family="text">
      <style:text-properties fo:font-weight="normal" officeooo:rsid="00125ab5" style:font-weight-asian="normal" style:font-weight-complex="normal"/>
    </style:style>
    <style:style style:name="T23" style:family="text">
      <style:text-properties officeooo:rsid="00137b18"/>
    </style:style>
    <style:style style:name="T24" style:family="text">
      <style:text-properties officeooo:rsid="0014052b"/>
    </style:style>
    <style:style style:name="T25" style:family="text">
      <style:text-properties officeooo:rsid="0015551f"/>
    </style:style>
    <style:style style:name="T26" style:family="text">
      <style:text-properties officeooo:rsid="001c8f3f"/>
    </style:style>
    <style:style style:name="T27" style:family="text">
      <style:text-properties officeooo:rsid="001d7439"/>
    </style:style>
    <style:style style:name="T28" style:family="text">
      <style:text-properties officeooo:rsid="001d0a55"/>
    </style:style>
    <style:style style:name="T29" style:family="text">
      <style:text-properties officeooo:rsid="001d42ff"/>
    </style:style>
    <style:style style:name="T30" style:family="text">
      <style:text-properties officeooo:rsid="001f00b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modeletraitementpcg66_commentaire" text:name="modeletraitementpcg66_commentaire"/>
        <text:user-field-decl office:value-type="string" office:string-value="dossierpcg66_orgpayeur" text:name="dossierpcg66_orgpayeur"/>
      </text:user-field-decls>
      <text:p text:style-name="P33"><text:s text:c="80"/>Perpignan, <text:span text:style-name="T12">le</text:span> <text:span text:style-name="T5"><text:date style:data-style-name="N76" text:date-value="2015-06-29T09:02:52.41">29 juin 2015</text:date></text:span></text:p>
      <text:p text:style-name="P21"/>
      <text:p text:style-name="P2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Direction des Politiques Sociales</text:p>
            <text:p text:style-name="P4">Pôle Dispositif et Allocation rSa</text:p>
            <text:p text:style-name="P3"><text:span text:style-name="T14">Mission Gestion de </text:span><text:span text:style-name="T24">l'</text:span>Allocation</text:p>
            <text:p text:style-name="P3">25, <text:span text:style-name="T13">r</text:span>ue Petite la Monnaie</text:p>
            <text:p text:style-name="P2">66000 PERPIGNAN</text:p>
            <text:p text:style-name="P15"><text:span text:style-name="T1">Suivi Par : </text:span><text:span text:style-name="T2"><text:user-field-get text:name="dossierpcg66_user_nom_complet">dossierpcg66_user_nom_complet</text:user-field-get></text:span></text:p>
            <text:p text:style-name="P2">Tél : 04.68.854.854</text:p>
            <text:p text:style-name="P20">du mardi au vendredi de 13h30 à 16h30</text:p>
          </table:table-cell>
          <table:table-cell table:style-name="Tableau1.A1" office:value-type="string">
            <text:p text:style-name="P28"><text:user-field-get text:name="personne_qual">qual</text:user-field-get> <text:user-field-get text:name="personne_nom">nom</text:user-field-get> <text:user-field-get text:name="personne_prenom">prenom</text:user-field-get></text:p>
            <text:p text:style-name="P28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8"><text:user-field-get text:name="adresse_complideadr">complideadr</text:user-field-get></text:p>
            <text:p text:style-name="P28"><text:user-field-get text:name="adresse_compladr">compladr</text:user-field-get></text:p>
            <text:p text:style-name="P29"><text:user-field-get text:name="adresse_codepos">codepos</text:user-field-get> <text:user-field-get text:name="adresse_nomcom">locaadr</text:user-field-get></text:p>
          </table:table-cell>
        </table:table-row>
      </table:table>
      <text:p text:style-name="P22"><text:span text:style-name="T3">Référence : </text:span><text:span text:style-name="T4"><text:user-field-get text:name="dossier_matricule">matricule</text:user-field-get></text:span></text:p>
      <text:p text:style-name="P16"/>
      <text:p text:style-name="P5">Objet : <text:span text:style-name="T18">i</text:span><text:span text:style-name="T17">nformation relative à pension retraite et complément ASPA</text:span></text:p>
      <text:p text:style-name="P5"><text:span text:style-name="T17"><text:tab/> (subsidiarité rSa)</text:span> <text:span text:style-name="T18">- </text:span>Intention de <text:span text:style-name="T18">suspension du versement</text:span> </text:p>
      <text:p text:style-name="P17"/>
      <text:p text:style-name="P17"/>
      <text:p text:style-name="P17"/>
      <text:p text:style-name="P31"><text:user-field-get text:name="personne_qual">qual</text:user-field-get>,<text:span text:style-name="T15"><text:user-field-get text:name="dossierpcg66_orgpayeur">dossierpcg66_orgpayeur</text:user-field-get></text:span></text:p>
      <text:p text:style-name="P32"/>
      <text:p text:style-name="P8"><text:tab/>En application des articles L. 262-10, <text:span text:style-name="T18">R</text:span>. 262-<text:span text:style-name="T18">47 et </text:span>R. 262-4<text:span text:style-name="T18">9</text:span> du Code de l'Action Sociale et des Familles, nous vous rappelons que le revenu de solidarité active est subordonné à l'obligation de faire <text:span text:style-name="T18">valoir ses droits </text:span>à p<text:span text:style-name="T18">restation</text:span><text:span text:style-name="T23">s</text:span><text:span text:style-name="T18"> sociale</text:span><text:span text:style-name="T23">s </text:span><text:span text:style-name="T25">(pension vieillesse, ASPA)</text:span>.</text:p>
      <text:p text:style-name="P10"><text:tab/><text:span text:style-name="T26">Le rSa </text:span><text:span text:style-name="T27">vous </text:span><text:span text:style-name="T26">sera versé à titre d'avance sur d'éventuels droits à retraite et/ou l'ASPA.</text:span></text:p>
      <text:p text:style-name="P11"/>
      <text:p text:style-name="P8"><text:tab/><text:span text:style-name="T18">Nous vous avons</text:span> demandé d'effectuer des démarches et d<text:span text:style-name="T18">e nous adresser </text:span><text:span text:style-name="T19">l'ensemble des documents justifiant du dépôt de vos dossiers.</text:span><text:span text:style-name="T21"> </text:span><text:span text:style-name="T22">A ce jour nous n'avons pas reçu l'ensemble des documents demandés.</text:span><text:span text:style-name="T20"> </text:span></text:p>
      <text:p text:style-name="P7"/>
      <text:p text:style-name="P9"><text:tab/></text:p>
      <text:p text:style-name="P14"><text:tab/>Vous disposez d'un délai d'un mois pour nous présenter vos observations écrites ou demander à être entendu(e), assisté(e) le cas échéant, de la personne de votre choix en adressant un courrier au <text:span text:style-name="T29">Département des Pyrénées-Orientales</text:span> – Pôle Dispositif et Allocation rSa<text:span text:style-name="T11"> - <text:s/>25, rue Petite la Monnaie – 66000 PERPIGNAN. </text:span></text:p>
      <text:p text:style-name="P12"/>
      <text:p text:style-name="P13"><text:tab/><text:span text:style-name="T9">S</text:span><text:span text:style-name="T10">ans réponse de votre part dans le délai ci-dessus mentionné, votre droit au rSa sera suspendu.</text:span></text:p>
      <text:list xml:id="list29182496" text:style-name="L1">
        <text:list-header>
          <text:p text:style-name="P34"/>
        </text:list-header>
      </text:list>
      <text:p text:style-name="P6"><text:s/><text:tab/> Je vous prie d'agréer, <text:user-field-get text:name="personne_qual">qual</text:user-field-get>, l’expression de mes sincères salutations.</text:p>
      <text:p text:style-name="P6"/>
      <text:p text:style-name="P18"><text:s text:c="6"/><text:span text:style-name="T8"><text:tab/></text:span></text:p>
      <text:section text:style-name="Sect1" text:name="MSA" text:condition="ooow:dossierpcg66_orgpayeur!=&quot;CAF&quot;" text:is-hidden="true" text:display="condition">
        <text:p text:style-name="P26">Pour la Présidente du <text:span text:style-name="T30">Département </text:span>et <text:span text:style-name="T14">p</text:span>ar Délégation</text:p>
        <text:p text:style-name="P24"><text:span text:style-name="T6"><text:tab/> <text:s text:c="3"/></text:span><text:span text:style-name="T8">Le Responsable du Pôle Dispositif et Allocation rSa</text:span></text:p>
        <text:p text:style-name="P27"/>
        <text:p text:style-name="P23"/>
        <text:p text:style-name="P30"><text:tab/>Olivier ESTEVE</text:p>
      </text:section>
      <text:section text:style-name="Sect1" text:name="CAF" text:condition="ooow:dossierpcg66_orgpayeur==&quot;CAF&quot;" text:display="condition">
        <text:p text:style-name="P26">Pour la Présidente du <text:span text:style-name="T28">Département </text:span>et <text:span text:style-name="T14">p</text:span>ar Délégation</text:p>
        <text:p text:style-name="P25"><text:span text:style-name="T6"><text:tab/> <text:s/></text:span><text:span text:style-name="T7">Le Directeur des Politiques Sociales</text:span></text:p>
        <text:p text:style-name="P27"/>
        <text:p text:style-name="P23"/>
        <text:p text:style-name="P30"><text:tab/><text:span text:style-name="T16">Françoise I</text:span><text:span text:style-name="T25">L</text:span><text:span text:style-name="T16">LES</text:span></text:p>
      </text:section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3.228cm" fo:margin-bottom="1.494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5-06-29T09:02:52.29</dc:date>
    <meta:generator>LibreOffice/3.6$Windows_x86 LibreOffice_project/da8c1e6-fd468f4-454e206-f42a4a9-143cfd</meta:generator>
    <meta:editing-duration>PT1H24M</meta:editing-duration>
    <meta:editing-cycles>44</meta:editing-cycles>
    <meta:printed-by>Marie-José FEREZ</meta:printed-by>
    <meta:print-date>2013-10-15T14:20:09.18</meta:print-date>
    <dc:creator>Régine BOULOC</dc:creator>
    <meta:document-statistic meta:table-count="1" meta:image-count="0" meta:object-count="0" meta:page-count="1" meta:paragraph-count="29" meta:word-count="252" meta:character-count="1745" meta:non-whitespace-character-count="1414"/>
  </office:meta>
</office:document-meta>
</file>