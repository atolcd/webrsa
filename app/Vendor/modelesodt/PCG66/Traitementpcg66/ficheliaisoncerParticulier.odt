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14cm" fo:text-indent="0cm" style:auto-text-indent="false" style:snap-to-layout-grid="false"/>
    </style:style>
    <style:style style:name="P2" style:family="paragraph" style:parent-style-name="Text_20_body">
      <style:paragraph-properties style:writing-mode="lr-tb"/>
      <style:text-properties fo:font-weight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868cm" fo:margin-right="-0.014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paragraph-rsid="0019d105" style:font-size-asian="15pt" style:font-weight-asian="bold" style:font-size-complex="15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9d105" style:font-weight-asian="bold"/>
    </style:style>
    <style:style style:name="T6" style:family="text">
      <style:text-properties fo:color="#000000" style:font-name="Verdana" fo:font-size="10pt" fo:font-style="normal" fo:background-color="transparent" style:font-name-asian="Times New Roman" style:font-size-asian="10pt" style:font-style-asian="normal" style:font-weight-asian="bold" style:font-name-complex="Times New Roman" style:font-size-complex="10pt" style:font-style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9d1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ef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contratinsertion_observ_ci"/>
        <text:user-field-decl office:value-type="string" office:string-value="adresse_complideadr" text:name="adresse_complideadr"/>
        <text:user-field-decl office:value-type="string" office:string-value="structurereferente_lib_struc" text:name="structurereferente_lib_struc"/>
        <text:user-field-decl office:value-type="string" office:string-value="propodecisioncer66_motifscersnonvalids66" text:name="propodecisioncer66_motifscersnonvalids66"/>
        <text:user-field-decl office:value-type="string" office:string-value="propodecisioncer66_motifficheliaison" text:name="propodecisioncer66_motifficheliaison"/>
      </text:user-field-decls>
      <text:p text:style-name="P12">FICHE DE LIAISON</text:p>
      <text:p text:style-name="P11"><text:span text:style-name="T8">Pôle Dispositif et Allocation rSa</text:span></text:p>
      <text:p text:style-name="P11"><text:span text:style-name="T8">Mission Gestion de l'Allocation</text:span></text:p>
      <text:p text:style-name="P3"><text:s text:c="2"/></text:p>
      <text:p text:style-name="P8"><text:span text:style-name="T4"><text:tab/><text:tab/>Du Responsable </text:span><text:span text:style-name="T5">du pôle</text:span><text:span text:style-name="T4"> au Référent <text:s/></text:span><text:span text:style-name="T4"><text:user-field-get text:name="referent_qual">refrent_qual</text:user-field-get></text:span><text:span text:style-name="T4"> </text:span><text:span text:style-name="T4"><text:user-field-get text:name="referent_nom">referent_nom</text:user-field-get></text:span><text:span text:style-name="T4"> </text:span><text:span text:style-name="T4"><text:user-field-get text:name="referent_prenom">referent_prenom</text:user-field-get></text:span><text:span text:style-name="T4"> </text:span></text:p>
      <text:p text:style-name="P4"/>
      <text:p text:style-name="Standard"><text:span text:style-name="T1">Dossier de </text:span><text:span text:style-name="T2">:</text:span><text:span text:style-name="T3"><text:tab/></text:span></text:p>
      <text:p text:style-name="P9"><text:tab/></text:p>
      <text:p text:style-name="P6"><text:s text:c="7"/>Nom, prénom : <text:user-field-get text:name="personne_qual"/> <text:user-field-get text:name="personne_nom"/> <text:user-field-get text:name="personne_prenom"/></text:p>
      <text:p text:style-name="P6"/>
      <text:p text:style-name="P6"><text:s text:c="7"/>N° allocataire : <text:user-field-get text:name="dossier_matricule"/></text:p>
      <text:p text:style-name="P6"/>
      <text:p text:style-name="P6"><text:s text:c="7"/>Demeurant à : <text:user-field-get text:name="adresse_numvoie"/> <text:user-field-get text:name="adresse_libtypevoie"/> <text:user-field-get text:name="adresse_nomvoie"/></text:p>
      <text:p text:style-name="P2"><text:tab/><text:tab/><text:tab/><text:user-field-get text:name="adresse_compladr"/></text:p>
      <text:p text:style-name="P2"><text:tab/><text:tab/><text:tab/><text:span text:style-name="T6"><text:user-field-get text:name="adresse_complideadr">adresse_complideadr</text:user-field-get></text:span> </text:p>
      <text:p text:style-name="P6"><text:tab/><text:user-field-get text:name="adresse_codepos"/> <text:s/><text:user-field-get text:name="adresse_nomcom"/></text:p>
      <text:p text:style-name="P6"/>
      <text:p text:style-name="P6"><text:s text:c="7"/>MSP : <text:span text:style-name="T7"><text:user-field-get text:name="structurereferente_lib_struc">structurereferente_lib_struc</text:user-field-get></text:span></text:p>
      <text:p text:style-name="P5"/>
      <text:p text:style-name="P7">Motif(s) de la non validation du CER :</text:p>
      <text:p text:style-name="P10"/>
      <text:p text:style-name="P10"><text:user-field-get text:name="propodecisioncer66_motifscersnonvalids66">propodecisioncer66_motifscersnonvalids66</text:user-field-get></text:p>
      <text:p text:style-name="P10"/>
      <text:p text:style-name="P7">Informations complémentaires du responsable de <text:s/>Mission <text:s/>:</text:p>
      <text:p text:style-name="P7"/>
      <text:p text:style-name="P7"><text:user-field-get text:name="propodecisioncer66_motifficheliaison">propodecisioncer66_motifficheliaison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14cm" fo:text-indent="0cm" style:auto-text-indent="false" style:snap-to-layout-grid="false"/>
    </style:style>
    <style:style style:name="MT1" style:family="text">
      <style:text-properties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5.644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Date : </text:span><text:span text:style-name="MT1"><text:date style:data-style-name="N36" text:date-value="2013-03-27T10:52:20.88">27/03/2013</text:date></text:span><text:span text:style-name="MT1"><text:tab/><text:tab/><text:tab/><text:tab/>Signature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date>2013-03-27T10:52:20.77</dc:date>
    <meta:print-date>2007-07-26T09:47:00</meta:print-date>
    <meta:editing-cycles>16</meta:editing-cycles>
    <meta:editing-duration>PT22M12S</meta:editing-duration>
    <meta:generator>LibreOffice/4.0.0.3$Windows_x86 LibreOffice_project/7545bee9c2a0782548772a21bc84a9dcc583b89</meta:generator>
    <meta:document-statistic meta:table-count="0" meta:image-count="0" meta:object-count="0" meta:page-count="1" meta:paragraph-count="19" meta:word-count="58" meta:character-count="518" meta:non-whitespace-character-count="417"/>
    <meta:user-defined meta:name="Info 1"/>
    <meta:user-defined meta:name="Info 2"/>
    <meta:user-defined meta:name="Info 3"/>
    <meta:user-defined meta:name="Info 4"/>
  </office:meta>
</office:document-meta>
</file>